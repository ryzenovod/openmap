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65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Анучинский район </text:p>
          </table:table-cell>
          <table:table-cell office:value-type="float" office:value="13380" calcext:value-type="float">
            <text:p>13380</text:p>
          </table:table-cell>
          <table:table-cell office:value-type="float" office:value="498" calcext:value-type="float">
            <text:p>498</text:p>
          </table:table-cell>
          <table:table-cell table:formula="of:=[.C1]/[.B1]*100" office:value-type="float" office:value="3.7219730941704" calcext:value-type="float">
            <text:p>3,7219730941704</text:p>
          </table:table-cell>
          <table:table-cell table:formula="of:=([.D1]-[.D$37])/[.D$38]" office:value-type="float" office:value="0.549317528831116" calcext:value-type="float">
            <text:p>0,549317528831116</text:p>
          </table:table-cell>
          <table:table-cell table:formula="of:=[.E1]*255" office:value-type="float" office:value="140.075969851935" calcext:value-type="float">
            <text:p>140,075969851935</text:p>
          </table:table-cell>
          <table:table-cell table:formula="of:=255-[.F1]" office:value-type="float" office:value="114.924030148065" calcext:value-type="float">
            <text:p>114,924030148065</text:p>
          </table:table-cell>
          <table:table-cell office:value-type="string" calcext:value-type="string">
            <text:p>Анучин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рсеньевский городской округ</text:p>
          </table:table-cell>
          <table:table-cell office:value-type="float" office:value="52767" calcext:value-type="float">
            <text:p>52767</text:p>
          </table:table-cell>
          <table:table-cell office:value-type="float" office:value="2308" calcext:value-type="float">
            <text:p>2308</text:p>
          </table:table-cell>
          <table:table-cell table:formula="of:=[.C2]/[.B2]*100" office:value-type="float" office:value="4.37394583736047" calcext:value-type="float">
            <text:p>4,37394583736047</text:p>
          </table:table-cell>
          <table:table-cell table:formula="of:=([.D2]-[.D$37])/[.D$38]" office:value-type="float" office:value="0.711719521636292" calcext:value-type="float">
            <text:p>0,711719521636292</text:p>
          </table:table-cell>
          <table:table-cell table:formula="of:=[.E2]*255" office:value-type="float" office:value="181.488478017255" calcext:value-type="float">
            <text:p>181,488478017255</text:p>
          </table:table-cell>
          <table:table-cell table:formula="of:=255-[.F2]" office:value-type="float" office:value="73.5115219827455" calcext:value-type="float">
            <text:p>73,5115219827455</text:p>
          </table:table-cell>
          <table:table-cell office:value-type="string" calcext:value-type="string">
            <text:p>Арсеньев (город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ртёмовский городской округ </text:p>
          </table:table-cell>
          <table:table-cell office:value-type="float" office:value="116284" calcext:value-type="float">
            <text:p>116284</text:p>
          </table:table-cell>
          <table:table-cell office:value-type="float" office:value="4410" calcext:value-type="float">
            <text:p>4410</text:p>
          </table:table-cell>
          <table:table-cell table:formula="of:=[.C3]/[.B3]*100" office:value-type="float" office:value="3.7924392005779" calcext:value-type="float">
            <text:p>3,7924392005779</text:p>
          </table:table-cell>
          <table:table-cell table:formula="of:=([.D3]-[.D$37])/[.D$38]" office:value-type="float" office:value="0.56687015848524" calcext:value-type="float">
            <text:p>0,56687015848524</text:p>
          </table:table-cell>
          <table:table-cell table:formula="of:=[.E3]*255" office:value-type="float" office:value="144.551890413736" calcext:value-type="float">
            <text:p>144,551890413736</text:p>
          </table:table-cell>
          <table:table-cell table:formula="of:=255-[.F3]" office:value-type="float" office:value="110.448109586264" calcext:value-type="float">
            <text:p>110,448109586264</text:p>
          </table:table-cell>
          <table:table-cell office:value-type="string" calcext:value-type="string">
            <text:p>Артём (город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ладивостокский городской округ </text:p>
          </table:table-cell>
          <table:table-cell office:value-type="float" office:value="633414" calcext:value-type="float">
            <text:p>633414</text:p>
          </table:table-cell>
          <table:table-cell table:formula="of:=SUM([.I5:.M5])" office:value-type="float" office:value="29655" calcext:value-type="float">
            <text:p>29655</text:p>
          </table:table-cell>
          <table:table-cell table:formula="of:=[.C4]/[.B4]*100" office:value-type="float" office:value="4.68177211113111" calcext:value-type="float">
            <text:p>4,68177211113111</text:p>
          </table:table-cell>
          <table:table-cell table:formula="of:=([.D4]-[.D$37])/[.D$38]" office:value-type="float" office:value="0.788396960716854" calcext:value-type="float">
            <text:p>0,788396960716854</text:p>
          </table:table-cell>
          <table:table-cell table:formula="of:=[.E4]*255" office:value-type="float" office:value="201.041224982798" calcext:value-type="float">
            <text:p>201,041224982798</text:p>
          </table:table-cell>
          <table:table-cell table:formula="of:=255-[.F4]" office:value-type="float" office:value="53.9587750172022" calcext:value-type="float">
            <text:p>53,9587750172022</text:p>
          </table:table-cell>
          <table:table-cell office:value-type="string" calcext:value-type="string">
            <text:p>Владивосток</text:p>
          </table:table-cell>
          <table:table-cell table:style-name="ce1" office:value-type="string" calcext:value-type="string">
            <text:p>Ленинский (город Владивосток)</text:p>
          </table:table-cell>
          <table:table-cell table:style-name="ce1" office:value-type="string" calcext:value-type="string">
            <text:p>Первомайский (город Владивосток)</text:p>
          </table:table-cell>
          <table:table-cell table:style-name="ce1" office:value-type="string" calcext:value-type="string">
            <text:p>Первореченский (город Владивосток)</text:p>
          </table:table-cell>
          <table:table-cell table:style-name="ce1" office:value-type="string" calcext:value-type="string">
            <text:p>Советский (город Владивосток)</text:p>
          </table:table-cell>
          <table:table-cell table:style-name="ce1" office:value-type="string" calcext:value-type="string">
            <text:p>Фрунзенский (город Владивосток)</text:p>
          </table:table-cell>
        </table:table-row>
        <table:table-row table:style-name="ro1">
          <table:table-cell office:value-type="string" calcext:value-type="string">
            <text:p>Городской округ ЗАТО Большой Камень </text:p>
          </table:table-cell>
          <table:table-cell office:value-type="float" office:value="39739" calcext:value-type="float">
            <text:p>39739</text:p>
          </table:table-cell>
          <table:table-cell office:value-type="float" office:value="1390" calcext:value-type="float">
            <text:p>1390</text:p>
          </table:table-cell>
          <table:table-cell table:formula="of:=[.C5]/[.B5]*100" office:value-type="float" office:value="3.49782329701301" calcext:value-type="float">
            <text:p>3,49782329701301</text:p>
          </table:table-cell>
          <table:table-cell table:formula="of:=([.D5]-[.D$37])/[.D$38]" office:value-type="float" office:value="0.493483333114403" calcext:value-type="float">
            <text:p>0,493483333114403</text:p>
          </table:table-cell>
          <table:table-cell table:formula="of:=[.E5]*255" office:value-type="float" office:value="125.838249944173" calcext:value-type="float">
            <text:p>125,838249944173</text:p>
          </table:table-cell>
          <table:table-cell table:formula="of:=255-[.F5]" office:value-type="float" office:value="129.161750055827" calcext:value-type="float">
            <text:p>129,161750055827</text:p>
          </table:table-cell>
          <table:table-cell office:value-type="string" calcext:value-type="string">
            <text:p>Большой Камень (город)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7068" calcext:value-type="float">
            <text:p>7068</text:p>
          </table:table-cell>
          <table:table-cell office:value-type="float" office:value="6918" calcext:value-type="float">
            <text:p>6918</text:p>
          </table:table-cell>
          <table:table-cell office:value-type="float" office:value="5908" calcext:value-type="float">
            <text:p>5908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Дальнегорский городской округ </text:p>
          </table:table-cell>
          <table:table-cell office:value-type="float" office:value="43211" calcext:value-type="float">
            <text:p>43211</text:p>
          </table:table-cell>
          <table:table-cell table:formula="of:=SUM([.J6:.K6])" office:value-type="float" office:value="2127" calcext:value-type="float">
            <text:p>2127</text:p>
          </table:table-cell>
          <table:table-cell table:formula="of:=[.C6]/[.B6]*100" office:value-type="float" office:value="4.92235773298466" calcext:value-type="float">
            <text:p>4,92235773298466</text:p>
          </table:table-cell>
          <table:table-cell table:formula="of:=([.D6]-[.D$37])/[.D$38]" office:value-type="float" office:value="0.848325209002378" calcext:value-type="float">
            <text:p>0,848325209002378</text:p>
          </table:table-cell>
          <table:table-cell table:formula="of:=[.E6]*255" office:value-type="float" office:value="216.322928295606" calcext:value-type="float">
            <text:p>216,322928295606</text:p>
          </table:table-cell>
          <table:table-cell table:formula="of:=255-[.F6]" office:value-type="float" office:value="38.6770717043935" calcext:value-type="float">
            <text:p>38,6770717043935</text:p>
          </table:table-cell>
          <table:table-cell office:value-type="string" calcext:value-type="string">
            <text:p>Дальнегорск (город)</text:p>
          </table:table-cell>
          <table:table-cell table:style-name="ce1" office:value-type="string" calcext:value-type="string">
            <text:p>Дальнегорский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льнереченский округ </text:p>
          </table:table-cell>
          <table:table-cell office:value-type="float" office:value="28891" calcext:value-type="float">
            <text:p>28891</text:p>
          </table:table-cell>
          <table:table-cell office:value-type="float" office:value="1141" calcext:value-type="float">
            <text:p>1141</text:p>
          </table:table-cell>
          <table:table-cell table:formula="of:=[.C7]/[.B7]*100" office:value-type="float" office:value="3.94932677996608" calcext:value-type="float">
            <text:p>3,94932677996608</text:p>
          </table:table-cell>
          <table:table-cell table:formula="of:=([.D7]-[.D$37])/[.D$38]" office:value-type="float" office:value="0.605949791499275" calcext:value-type="float">
            <text:p>0,605949791499275</text:p>
          </table:table-cell>
          <table:table-cell table:formula="of:=[.E7]*255" office:value-type="float" office:value="154.517196832315" calcext:value-type="float">
            <text:p>154,517196832315</text:p>
          </table:table-cell>
          <table:table-cell table:formula="of:=255-[.F7]" office:value-type="float" office:value="100.482803167685" calcext:value-type="float">
            <text:p>100,482803167685</text:p>
          </table:table-cell>
          <table:table-cell office:value-type="string" calcext:value-type="string">
            <text:p>Дальнереченск (город)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Дальнереченский район </text:p>
          </table:table-cell>
          <table:table-cell office:value-type="float" office:value="9758" calcext:value-type="float">
            <text:p>9758</text:p>
          </table:table-cell>
          <table:table-cell office:value-type="float" office:value="148" calcext:value-type="float">
            <text:p>148</text:p>
          </table:table-cell>
          <table:table-cell table:formula="of:=[.C8]/[.B8]*100" office:value-type="float" office:value="1.51670424267268" calcext:value-type="float">
            <text:p>1,51670424267268</text:p>
          </table:table-cell>
          <table:table-cell table:formula="of:=([.D8]-[.D$37])/[.D$38]" office:value-type="float" office:value="0" calcext:value-type="float">
            <text:p>0</text:p>
          </table:table-cell>
          <table:table-cell table:formula="of:=[.E8]*255" office:value-type="float" office:value="0" calcext:value-type="float">
            <text:p>0</text:p>
          </table:table-cell>
          <table:table-cell table:formula="of:=255-[.F8]" office:value-type="float" office:value="255" calcext:value-type="float">
            <text:p>255</text:p>
          </table:table-cell>
          <table:table-cell office:value-type="string" calcext:value-type="string">
            <text:p>Дальнереченский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ЗАТО Фокино </text:p>
          </table:table-cell>
          <table:table-cell office:value-type="float" office:value="31551" calcext:value-type="float">
            <text:p>31551</text:p>
          </table:table-cell>
          <table:table-cell office:value-type="float" office:value="825" calcext:value-type="float">
            <text:p>825</text:p>
          </table:table-cell>
          <table:table-cell table:formula="of:=[.C9]/[.B9]*100" office:value-type="float" office:value="2.61481411048778" calcext:value-type="float">
            <text:p>2,61481411048778</text:p>
          </table:table-cell>
          <table:table-cell table:formula="of:=([.D9]-[.D$37])/[.D$38]" office:value-type="float" office:value="0.273531727690971" calcext:value-type="float">
            <text:p>0,273531727690971</text:p>
          </table:table-cell>
          <table:table-cell table:formula="of:=[.E9]*255" office:value-type="float" office:value="69.7505905611976" calcext:value-type="float">
            <text:p>69,7505905611976</text:p>
          </table:table-cell>
          <table:table-cell table:formula="of:=255-[.F9]" office:value-type="float" office:value="185.249409438802" calcext:value-type="float">
            <text:p>185,249409438802</text:p>
          </table:table-cell>
          <table:table-cell office:value-type="string" calcext:value-type="string">
            <text:p>Фокино (город)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авалеровский район </text:p>
          </table:table-cell>
          <table:table-cell office:value-type="float" office:value="24244" calcext:value-type="float">
            <text:p>24244</text:p>
          </table:table-cell>
          <table:table-cell office:value-type="float" office:value="1341" calcext:value-type="float">
            <text:p>1341</text:p>
          </table:table-cell>
          <table:table-cell table:formula="of:=[.C10]/[.B10]*100" office:value-type="float" office:value="5.5312654677446" calcext:value-type="float">
            <text:p>5,5312654677446</text:p>
          </table:table-cell>
          <table:table-cell table:formula="of:=([.D10]-[.D$37])/[.D$38]" office:value-type="float" office:value="1" calcext:value-type="float">
            <text:p>1</text:p>
          </table:table-cell>
          <table:table-cell table:formula="of:=[.E10]*255" office:value-type="float" office:value="255" calcext:value-type="float">
            <text:p>255</text:p>
          </table:table-cell>
          <table:table-cell table:formula="of:=255-[.F10]" office:value-type="float" office:value="0" calcext:value-type="float">
            <text:p>0</text:p>
          </table:table-cell>
          <table:table-cell office:value-type="string" calcext:value-type="string">
            <text:p>Кавалеровский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ировский район </text:p>
          </table:table-cell>
          <table:table-cell office:value-type="float" office:value="19008" calcext:value-type="float">
            <text:p>19008</text:p>
          </table:table-cell>
          <table:table-cell office:value-type="float" office:value="1006" calcext:value-type="float">
            <text:p>1006</text:p>
          </table:table-cell>
          <table:table-cell table:formula="of:=[.C11]/[.B11]*100" office:value-type="float" office:value="5.29250841750842" calcext:value-type="float">
            <text:p>5,29250841750842</text:p>
          </table:table-cell>
          <table:table-cell table:formula="of:=([.D11]-[.D$37])/[.D$38]" office:value-type="float" office:value="0.940527236514645" calcext:value-type="float">
            <text:p>0,940527236514645</text:p>
          </table:table-cell>
          <table:table-cell table:formula="of:=[.E11]*255" office:value-type="float" office:value="239.834445311234" calcext:value-type="float">
            <text:p>239,834445311234</text:p>
          </table:table-cell>
          <table:table-cell table:formula="of:=255-[.F11]" office:value-type="float" office:value="15.1655546887655" calcext:value-type="float">
            <text:p>15,1655546887655</text:p>
          </table:table-cell>
          <table:table-cell office:value-type="string" calcext:value-type="string">
            <text:p>Кировский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расноармейский район </text:p>
          </table:table-cell>
          <table:table-cell office:value-type="float" office:value="16889" calcext:value-type="float">
            <text:p>16889</text:p>
          </table:table-cell>
          <table:table-cell office:value-type="float" office:value="597" calcext:value-type="float">
            <text:p>597</text:p>
          </table:table-cell>
          <table:table-cell table:formula="of:=[.C12]/[.B12]*100" office:value-type="float" office:value="3.53484516549233" calcext:value-type="float">
            <text:p>3,53484516549233</text:p>
          </table:table-cell>
          <table:table-cell table:formula="of:=([.D12]-[.D$37])/[.D$38]" office:value-type="float" office:value="0.502705229706268" calcext:value-type="float">
            <text:p>0,502705229706268</text:p>
          </table:table-cell>
          <table:table-cell table:formula="of:=[.E12]*255" office:value-type="float" office:value="128.189833575098" calcext:value-type="float">
            <text:p>128,189833575098</text:p>
          </table:table-cell>
          <table:table-cell table:formula="of:=255-[.F12]" office:value-type="float" office:value="126.810166424902" calcext:value-type="float">
            <text:p>126,810166424902</text:p>
          </table:table-cell>
          <table:table-cell office:value-type="string" calcext:value-type="string">
            <text:p>Красноармей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азовский район </text:p>
          </table:table-cell>
          <table:table-cell office:value-type="float" office:value="12877" calcext:value-type="float">
            <text:p>12877</text:p>
          </table:table-cell>
          <table:table-cell office:value-type="float" office:value="631" calcext:value-type="float">
            <text:p>631</text:p>
          </table:table-cell>
          <table:table-cell table:formula="of:=[.C13]/[.B13]*100" office:value-type="float" office:value="4.90020967616681" calcext:value-type="float">
            <text:p>4,90020967616681</text:p>
          </table:table-cell>
          <table:table-cell table:formula="of:=([.D13]-[.D$37])/[.D$38]" office:value-type="float" office:value="0.842808278116002" calcext:value-type="float">
            <text:p>0,842808278116002</text:p>
          </table:table-cell>
          <table:table-cell table:formula="of:=[.E13]*255" office:value-type="float" office:value="214.916110919581" calcext:value-type="float">
            <text:p>214,916110919581</text:p>
          </table:table-cell>
          <table:table-cell table:formula="of:=255-[.F13]" office:value-type="float" office:value="40.0838890804195" calcext:value-type="float">
            <text:p>40,0838890804195</text:p>
          </table:table-cell>
          <table:table-cell office:value-type="string" calcext:value-type="string">
            <text:p>Лазов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созаводский городской округ </text:p>
          </table:table-cell>
          <table:table-cell office:value-type="float" office:value="43481" calcext:value-type="float">
            <text:p>43481</text:p>
          </table:table-cell>
          <table:table-cell table:formula="of:=SUM([.J14:.K14])" office:value-type="float" office:value="2078" calcext:value-type="float">
            <text:p>2078</text:p>
          </table:table-cell>
          <table:table-cell table:formula="of:=[.C14]/[.B14]*100" office:value-type="float" office:value="4.77909891676824" calcext:value-type="float">
            <text:p>4,77909891676824</text:p>
          </table:table-cell>
          <table:table-cell table:formula="of:=([.D14]-[.D$37])/[.D$38]" office:value-type="float" office:value="0.81264040855103" calcext:value-type="float">
            <text:p>0,81264040855103</text:p>
          </table:table-cell>
          <table:table-cell table:formula="of:=[.E14]*255" office:value-type="float" office:value="207.223304180513" calcext:value-type="float">
            <text:p>207,223304180513</text:p>
          </table:table-cell>
          <table:table-cell table:formula="of:=255-[.F14]" office:value-type="float" office:value="47.7766958194875" calcext:value-type="float">
            <text:p>47,7766958194875</text:p>
          </table:table-cell>
          <table:table-cell office:value-type="string" calcext:value-type="string">
            <text:p>Лесозаводск (город)</text:p>
          </table:table-cell>
          <table:table-cell table:style-name="ce1" office:value-type="string" calcext:value-type="string">
            <text:p>Лесозаводский</text:p>
          </table:table-cell>
          <table:table-cell office:value-type="float" office:value="85" calcext:value-type="float">
            <text:p>85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ихайловский район </text:p>
          </table:table-cell>
          <table:table-cell office:value-type="float" office:value="30238" calcext:value-type="float">
            <text:p>30238</text:p>
          </table:table-cell>
          <table:table-cell office:value-type="float" office:value="1240" calcext:value-type="float">
            <text:p>1240</text:p>
          </table:table-cell>
          <table:table-cell table:formula="of:=[.C15]/[.B15]*100" office:value-type="float" office:value="4.10080031748132" calcext:value-type="float">
            <text:p>4,10080031748132</text:p>
          </table:table-cell>
          <table:table-cell table:formula="of:=([.D15]-[.D$37])/[.D$38]" office:value-type="float" office:value="0.643680823366281" calcext:value-type="float">
            <text:p>0,643680823366281</text:p>
          </table:table-cell>
          <table:table-cell table:formula="of:=[.E15]*255" office:value-type="float" office:value="164.138609958402" calcext:value-type="float">
            <text:p>164,138609958402</text:p>
          </table:table-cell>
          <table:table-cell table:formula="of:=255-[.F15]" office:value-type="float" office:value="90.8613900415984" calcext:value-type="float">
            <text:p>90,8613900415984</text:p>
          </table:table-cell>
          <table:table-cell office:value-type="string" calcext:value-type="string">
            <text:p>Михайлов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деждинский район </text:p>
          </table:table-cell>
          <table:table-cell office:value-type="float" office:value="38698" calcext:value-type="float">
            <text:p>38698</text:p>
          </table:table-cell>
          <table:table-cell office:value-type="float" office:value="1305" calcext:value-type="float">
            <text:p>1305</text:p>
          </table:table-cell>
          <table:table-cell table:formula="of:=[.C16]/[.B16]*100" office:value-type="float" office:value="3.37226730063569" calcext:value-type="float">
            <text:p>3,37226730063569</text:p>
          </table:table-cell>
          <table:table-cell table:formula="of:=([.D16]-[.D$37])/[.D$38]" office:value-type="float" office:value="0.462208185137287" calcext:value-type="float">
            <text:p>0,462208185137287</text:p>
          </table:table-cell>
          <table:table-cell table:formula="of:=[.E16]*255" office:value-type="float" office:value="117.863087210008" calcext:value-type="float">
            <text:p>117,863087210008</text:p>
          </table:table-cell>
          <table:table-cell table:formula="of:=255-[.F16]" office:value-type="float" office:value="137.136912789992" calcext:value-type="float">
            <text:p>137,136912789992</text:p>
          </table:table-cell>
          <table:table-cell office:value-type="string" calcext:value-type="string">
            <text:p>Надеждин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ходкинский городской округ </text:p>
          </table:table-cell>
          <table:table-cell office:value-type="float" office:value="152294" calcext:value-type="float">
            <text:p>152294</text:p>
          </table:table-cell>
          <table:table-cell office:value-type="float" office:value="7120" calcext:value-type="float">
            <text:p>7120</text:p>
          </table:table-cell>
          <table:table-cell table:formula="of:=[.C17]/[.B17]*100" office:value-type="float" office:value="4.67516776760739" calcext:value-type="float">
            <text:p>4,67516776760739</text:p>
          </table:table-cell>
          <table:table-cell table:formula="of:=([.D17]-[.D$37])/[.D$38]" office:value-type="float" office:value="0.786751863493658" calcext:value-type="float">
            <text:p>0,786751863493658</text:p>
          </table:table-cell>
          <table:table-cell table:formula="of:=[.E17]*255" office:value-type="float" office:value="200.621725190883" calcext:value-type="float">
            <text:p>200,621725190883</text:p>
          </table:table-cell>
          <table:table-cell table:formula="of:=255-[.F17]" office:value-type="float" office:value="54.3782748091173" calcext:value-type="float">
            <text:p>54,3782748091173</text:p>
          </table:table-cell>
          <table:table-cell office:value-type="string" calcext:value-type="string">
            <text:p>Находка (город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ктябрьский район </text:p>
          </table:table-cell>
          <table:table-cell office:value-type="float" office:value="27500" calcext:value-type="float">
            <text:p>27500</text:p>
          </table:table-cell>
          <table:table-cell office:value-type="float" office:value="1005" calcext:value-type="float">
            <text:p>1005</text:p>
          </table:table-cell>
          <table:table-cell table:formula="of:=[.C18]/[.B18]*100" office:value-type="float" office:value="3.65454545454545" calcext:value-type="float">
            <text:p>3,65454545454545</text:p>
          </table:table-cell>
          <table:table-cell table:formula="of:=([.D18]-[.D$37])/[.D$38]" office:value-type="float" office:value="0.53252176066501" calcext:value-type="float">
            <text:p>0,53252176066501</text:p>
          </table:table-cell>
          <table:table-cell table:formula="of:=[.E18]*255" office:value-type="float" office:value="135.793048969578" calcext:value-type="float">
            <text:p>135,793048969578</text:p>
          </table:table-cell>
          <table:table-cell table:formula="of:=255-[.F18]" office:value-type="float" office:value="119.206951030423" calcext:value-type="float">
            <text:p>119,206951030423</text:p>
          </table:table-cell>
          <table:table-cell office:value-type="string" calcext:value-type="string">
            <text:p>Октябрь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льгинский район </text:p>
          </table:table-cell>
          <table:table-cell office:value-type="float" office:value="9487" calcext:value-type="float">
            <text:p>9487</text:p>
          </table:table-cell>
          <table:table-cell office:value-type="float" office:value="422" calcext:value-type="float">
            <text:p>422</text:p>
          </table:table-cell>
          <table:table-cell table:formula="of:=[.C19]/[.B19]*100" office:value-type="float" office:value="4.44819226309687" calcext:value-type="float">
            <text:p>4,44819226309687</text:p>
          </table:table-cell>
          <table:table-cell table:formula="of:=([.D19]-[.D$37])/[.D$38]" office:value-type="float" office:value="0.730213803221216" calcext:value-type="float">
            <text:p>0,730213803221216</text:p>
          </table:table-cell>
          <table:table-cell table:formula="of:=[.E19]*255" office:value-type="float" office:value="186.20451982141" calcext:value-type="float">
            <text:p>186,20451982141</text:p>
          </table:table-cell>
          <table:table-cell table:formula="of:=255-[.F19]" office:value-type="float" office:value="68.7954801785898" calcext:value-type="float">
            <text:p>68,7954801785898</text:p>
          </table:table-cell>
          <table:table-cell office:value-type="string" calcext:value-type="string">
            <text:p>Ольгин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артизанск </text:p>
          </table:table-cell>
          <table:table-cell office:value-type="float" office:value="45106" calcext:value-type="float">
            <text:p>45106</text:p>
          </table:table-cell>
          <table:table-cell office:value-type="float" office:value="2402" calcext:value-type="float">
            <text:p>2402</text:p>
          </table:table-cell>
          <table:table-cell table:formula="of:=[.C20]/[.B20]*100" office:value-type="float" office:value="5.32523389349532" calcext:value-type="float">
            <text:p>5,32523389349532</text:p>
          </table:table-cell>
          <table:table-cell table:formula="of:=([.D20]-[.D$37])/[.D$38]" office:value-type="float" office:value="0.948678930847397" calcext:value-type="float">
            <text:p>0,948678930847397</text:p>
          </table:table-cell>
          <table:table-cell table:formula="of:=[.E20]*255" office:value-type="float" office:value="241.913127366086" calcext:value-type="float">
            <text:p>241,913127366086</text:p>
          </table:table-cell>
          <table:table-cell table:formula="of:=255-[.F20]" office:value-type="float" office:value="13.0868726339137" calcext:value-type="float">
            <text:p>13,0868726339137</text:p>
          </table:table-cell>
          <table:table-cell office:value-type="string" calcext:value-type="string">
            <text:p>Партизанск (город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артизанский район </text:p>
          </table:table-cell>
          <table:table-cell office:value-type="float" office:value="29610" calcext:value-type="float">
            <text:p>29610</text:p>
          </table:table-cell>
          <table:table-cell office:value-type="float" office:value="804" calcext:value-type="float">
            <text:p>804</text:p>
          </table:table-cell>
          <table:table-cell table:formula="of:=[.C21]/[.B21]*100" office:value-type="float" office:value="2.71529888551165" calcext:value-type="float">
            <text:p>2,71529888551165</text:p>
          </table:table-cell>
          <table:table-cell table:formula="of:=([.D21]-[.D$37])/[.D$38]" office:value-type="float" office:value="0.298561804302163" calcext:value-type="float">
            <text:p>0,298561804302163</text:p>
          </table:table-cell>
          <table:table-cell table:formula="of:=[.E21]*255" office:value-type="float" office:value="76.1332600970515" calcext:value-type="float">
            <text:p>76,1332600970515</text:p>
          </table:table-cell>
          <table:table-cell table:formula="of:=255-[.F21]" office:value-type="float" office:value="178.866739902949" calcext:value-type="float">
            <text:p>178,866739902949</text:p>
          </table:table-cell>
          <table:table-cell office:value-type="string" calcext:value-type="string">
            <text:p>Партизан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граничный район </text:p>
          </table:table-cell>
          <table:table-cell office:value-type="float" office:value="22542" calcext:value-type="float">
            <text:p>22542</text:p>
          </table:table-cell>
          <table:table-cell office:value-type="float" office:value="578" calcext:value-type="float">
            <text:p>578</text:p>
          </table:table-cell>
          <table:table-cell table:formula="of:=[.C22]/[.B22]*100" office:value-type="float" office:value="2.56410256410256" calcext:value-type="float">
            <text:p>2,56410256410256</text:p>
          </table:table-cell>
          <table:table-cell table:formula="of:=([.D22]-[.D$37])/[.D$38]" office:value-type="float" office:value="0.260899825088885" calcext:value-type="float">
            <text:p>0,260899825088885</text:p>
          </table:table-cell>
          <table:table-cell table:formula="of:=[.E22]*255" office:value-type="float" office:value="66.5294553976658" calcext:value-type="float">
            <text:p>66,5294553976658</text:p>
          </table:table-cell>
          <table:table-cell table:formula="of:=255-[.F22]" office:value-type="float" office:value="188.470544602334" calcext:value-type="float">
            <text:p>188,470544602334</text:p>
          </table:table-cell>
          <table:table-cell office:value-type="string" calcext:value-type="string">
            <text:p>Пограничны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жарский район </text:p>
          </table:table-cell>
          <table:table-cell office:value-type="float" office:value="28553" calcext:value-type="float">
            <text:p>28553</text:p>
          </table:table-cell>
          <table:table-cell office:value-type="float" office:value="915" calcext:value-type="float">
            <text:p>915</text:p>
          </table:table-cell>
          <table:table-cell table:formula="of:=[.C23]/[.B23]*100" office:value-type="float" office:value="3.20456694567996" calcext:value-type="float">
            <text:p>3,20456694567996</text:p>
          </table:table-cell>
          <table:table-cell table:formula="of:=([.D23]-[.D$37])/[.D$38]" office:value-type="float" office:value="0.4204351629927" calcext:value-type="float">
            <text:p>0,4204351629927</text:p>
          </table:table-cell>
          <table:table-cell table:formula="of:=[.E23]*255" office:value-type="float" office:value="107.210966563139" calcext:value-type="float">
            <text:p>107,210966563139</text:p>
          </table:table-cell>
          <table:table-cell table:formula="of:=255-[.F23]" office:value-type="float" office:value="147.789033436861" calcext:value-type="float">
            <text:p>147,789033436861</text:p>
          </table:table-cell>
          <table:table-cell office:value-type="string" calcext:value-type="string">
            <text:p>Пожар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пасск-Дальний </text:p>
          </table:table-cell>
          <table:table-cell office:value-type="float" office:value="41127" calcext:value-type="float">
            <text:p>41127</text:p>
          </table:table-cell>
          <table:table-cell office:value-type="float" office:value="1837" calcext:value-type="float">
            <text:p>1837</text:p>
          </table:table-cell>
          <table:table-cell table:formula="of:=[.C24]/[.B24]*100" office:value-type="float" office:value="4.46665207771051" calcext:value-type="float">
            <text:p>4,46665207771051</text:p>
          </table:table-cell>
          <table:table-cell table:formula="of:=([.D24]-[.D$37])/[.D$38]" office:value-type="float" office:value="0.734812017964673" calcext:value-type="float">
            <text:p>0,734812017964673</text:p>
          </table:table-cell>
          <table:table-cell table:formula="of:=[.E24]*255" office:value-type="float" office:value="187.377064580992" calcext:value-type="float">
            <text:p>187,377064580992</text:p>
          </table:table-cell>
          <table:table-cell table:formula="of:=255-[.F24]" office:value-type="float" office:value="67.6229354190083" calcext:value-type="float">
            <text:p>67,6229354190083</text:p>
          </table:table-cell>
          <table:table-cell office:value-type="string" calcext:value-type="string">
            <text:p>Спасск (город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пасский район </text:p>
          </table:table-cell>
          <table:table-cell office:value-type="float" office:value="27967" calcext:value-type="float">
            <text:p>27967</text:p>
          </table:table-cell>
          <table:table-cell office:value-type="float" office:value="966" calcext:value-type="float">
            <text:p>966</text:p>
          </table:table-cell>
          <table:table-cell table:formula="of:=[.C25]/[.B25]*100" office:value-type="float" office:value="3.45407086923875" calcext:value-type="float">
            <text:p>3,45407086923875</text:p>
          </table:table-cell>
          <table:table-cell table:formula="of:=([.D25]-[.D$37])/[.D$38]" office:value-type="float" office:value="0.482584899805921" calcext:value-type="float">
            <text:p>0,482584899805921</text:p>
          </table:table-cell>
          <table:table-cell table:formula="of:=[.E25]*255" office:value-type="float" office:value="123.05914945051" calcext:value-type="float">
            <text:p>123,05914945051</text:p>
          </table:table-cell>
          <table:table-cell table:formula="of:=255-[.F25]" office:value-type="float" office:value="131.94085054949" calcext:value-type="float">
            <text:p>131,94085054949</text:p>
          </table:table-cell>
          <table:table-cell office:value-type="string" calcext:value-type="string">
            <text:p>Спас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ернейский район </text:p>
          </table:table-cell>
          <table:table-cell office:value-type="float" office:value="11388" calcext:value-type="float">
            <text:p>11388</text:p>
          </table:table-cell>
          <table:table-cell office:value-type="float" office:value="445" calcext:value-type="float">
            <text:p>445</text:p>
          </table:table-cell>
          <table:table-cell table:formula="of:=[.C26]/[.B26]*100" office:value-type="float" office:value="3.90762205830699" calcext:value-type="float">
            <text:p>3,90762205830699</text:p>
          </table:table-cell>
          <table:table-cell table:formula="of:=([.D26]-[.D$37])/[.D$38]" office:value-type="float" office:value="0.595561427909592" calcext:value-type="float">
            <text:p>0,595561427909592</text:p>
          </table:table-cell>
          <table:table-cell table:formula="of:=[.E26]*255" office:value-type="float" office:value="151.868164116946" calcext:value-type="float">
            <text:p>151,868164116946</text:p>
          </table:table-cell>
          <table:table-cell table:formula="of:=255-[.F26]" office:value-type="float" office:value="103.131835883054" calcext:value-type="float">
            <text:p>103,131835883054</text:p>
          </table:table-cell>
          <table:table-cell office:value-type="string" calcext:value-type="string">
            <text:p>Терней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ссурийский городской округ </text:p>
          </table:table-cell>
          <table:table-cell office:value-type="float" office:value="196863" calcext:value-type="float">
            <text:p>196863</text:p>
          </table:table-cell>
          <table:table-cell table:formula="of:=[.J27]+[.K27]" office:value-type="float" office:value="7085" calcext:value-type="float">
            <text:p>7085</text:p>
          </table:table-cell>
          <table:table-cell table:formula="of:=[.C27]/[.B27]*100" office:value-type="float" office:value="3.59894952327253" calcext:value-type="float">
            <text:p>3,59894952327253</text:p>
          </table:table-cell>
          <table:table-cell table:formula="of:=([.D27]-[.D$37])/[.D$38]" office:value-type="float" office:value="0.518673190882161" calcext:value-type="float">
            <text:p>0,518673190882161</text:p>
          </table:table-cell>
          <table:table-cell table:formula="of:=[.E27]*255" office:value-type="float" office:value="132.261663674951" calcext:value-type="float">
            <text:p>132,261663674951</text:p>
          </table:table-cell>
          <table:table-cell table:formula="of:=255-[.F27]" office:value-type="float" office:value="122.738336325049" calcext:value-type="float">
            <text:p>122,738336325049</text:p>
          </table:table-cell>
          <table:table-cell office:value-type="string" calcext:value-type="string">
            <text:p>Уссурийск (город)</text:p>
          </table:table-cell>
          <table:table-cell table:style-name="ce1" office:value-type="string" calcext:value-type="string">
            <text:p>Уссурийский</text:p>
          </table:table-cell>
          <table:table-cell office:value-type="float" office:value="479" calcext:value-type="float">
            <text:p>479</text:p>
          </table:table-cell>
          <table:table-cell office:value-type="float" office:value="6606" calcext:value-type="float">
            <text:p>6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анкайский район </text:p>
          </table:table-cell>
          <table:table-cell office:value-type="float" office:value="22288" calcext:value-type="float">
            <text:p>22288</text:p>
          </table:table-cell>
          <table:table-cell office:value-type="float" office:value="730" calcext:value-type="float">
            <text:p>730</text:p>
          </table:table-cell>
          <table:table-cell table:formula="of:=[.C28]/[.B28]*100" office:value-type="float" office:value="3.27530509691314" calcext:value-type="float">
            <text:p>3,27530509691314</text:p>
          </table:table-cell>
          <table:table-cell table:formula="of:=([.D28]-[.D$37])/[.D$38]" office:value-type="float" office:value="0.438055557169627" calcext:value-type="float">
            <text:p>0,438055557169627</text:p>
          </table:table-cell>
          <table:table-cell table:formula="of:=[.E28]*255" office:value-type="float" office:value="111.704167078255" calcext:value-type="float">
            <text:p>111,704167078255</text:p>
          </table:table-cell>
          <table:table-cell table:formula="of:=255-[.F28]" office:value-type="float" office:value="143.295832921745" calcext:value-type="float">
            <text:p>143,295832921745</text:p>
          </table:table-cell>
          <table:table-cell office:value-type="string" calcext:value-type="string">
            <text:p>Ханкай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асанский район </text:p>
          </table:table-cell>
          <table:table-cell office:value-type="float" office:value="31545" calcext:value-type="float">
            <text:p>31545</text:p>
          </table:table-cell>
          <table:table-cell office:value-type="float" office:value="1227" calcext:value-type="float">
            <text:p>1227</text:p>
          </table:table-cell>
          <table:table-cell table:formula="of:=[.C29]/[.B29]*100" office:value-type="float" office:value="3.88968140751308" calcext:value-type="float">
            <text:p>3,88968140751308</text:p>
          </table:table-cell>
          <table:table-cell table:formula="of:=([.D29]-[.D$37])/[.D$38]" office:value-type="float" office:value="0.591092533355968" calcext:value-type="float">
            <text:p>0,591092533355968</text:p>
          </table:table-cell>
          <table:table-cell table:formula="of:=[.E29]*255" office:value-type="float" office:value="150.728596005772" calcext:value-type="float">
            <text:p>150,728596005772</text:p>
          </table:table-cell>
          <table:table-cell table:formula="of:=255-[.F29]" office:value-type="float" office:value="104.271403994228" calcext:value-type="float">
            <text:p>104,271403994228</text:p>
          </table:table-cell>
          <table:table-cell office:value-type="string" calcext:value-type="string">
            <text:p>Хасан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орольский район </text:p>
          </table:table-cell>
          <table:table-cell office:value-type="float" office:value="27626" calcext:value-type="float">
            <text:p>27626</text:p>
          </table:table-cell>
          <table:table-cell office:value-type="float" office:value="1305" calcext:value-type="float">
            <text:p>1305</text:p>
          </table:table-cell>
          <table:table-cell table:formula="of:=[.C30]/[.B30]*100" office:value-type="float" office:value="4.72381090277275" calcext:value-type="float">
            <text:p>4,72381090277275</text:p>
          </table:table-cell>
          <table:table-cell table:formula="of:=([.D30]-[.D$37])/[.D$38]" office:value-type="float" office:value="0.798868538875657" calcext:value-type="float">
            <text:p>0,798868538875657</text:p>
          </table:table-cell>
          <table:table-cell table:formula="of:=[.E30]*255" office:value-type="float" office:value="203.711477413293" calcext:value-type="float">
            <text:p>203,711477413293</text:p>
          </table:table-cell>
          <table:table-cell table:formula="of:=255-[.F30]" office:value-type="float" office:value="51.2885225867074" calcext:value-type="float">
            <text:p>51,2885225867074</text:p>
          </table:table-cell>
          <table:table-cell office:value-type="string" calcext:value-type="string">
            <text:p>Хороль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рниговский район </text:p>
          </table:table-cell>
          <table:table-cell office:value-type="float" office:value="33359" calcext:value-type="float">
            <text:p>33359</text:p>
          </table:table-cell>
          <table:table-cell office:value-type="float" office:value="1321" calcext:value-type="float">
            <text:p>1321</text:p>
          </table:table-cell>
          <table:table-cell table:formula="of:=[.C31]/[.B31]*100" office:value-type="float" office:value="3.95995083785485" calcext:value-type="float">
            <text:p>3,95995083785485</text:p>
          </table:table-cell>
          <table:table-cell table:formula="of:=([.D31]-[.D$37])/[.D$38]" office:value-type="float" office:value="0.608596172334725" calcext:value-type="float">
            <text:p>0,608596172334725</text:p>
          </table:table-cell>
          <table:table-cell table:formula="of:=[.E31]*255" office:value-type="float" office:value="155.192023945355" calcext:value-type="float">
            <text:p>155,192023945355</text:p>
          </table:table-cell>
          <table:table-cell table:formula="of:=255-[.F31]" office:value-type="float" office:value="99.8079760546451" calcext:value-type="float">
            <text:p>99,8079760546451</text:p>
          </table:table-cell>
          <table:table-cell office:value-type="string" calcext:value-type="string">
            <text:p>Чернигов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угуевский район </text:p>
          </table:table-cell>
          <table:table-cell office:value-type="float" office:value="22907" calcext:value-type="float">
            <text:p>22907</text:p>
          </table:table-cell>
          <table:table-cell office:value-type="float" office:value="973" calcext:value-type="float">
            <text:p>973</text:p>
          </table:table-cell>
          <table:table-cell table:formula="of:=[.C32]/[.B32]*100" office:value-type="float" office:value="4.24760990090365" calcext:value-type="float">
            <text:p>4,24760990090365</text:p>
          </table:table-cell>
          <table:table-cell table:formula="of:=([.D32]-[.D$37])/[.D$38]" office:value-type="float" office:value="0.680250095869955" calcext:value-type="float">
            <text:p>0,680250095869955</text:p>
          </table:table-cell>
          <table:table-cell table:formula="of:=[.E32]*255" office:value-type="float" office:value="173.463774446838" calcext:value-type="float">
            <text:p>173,463774446838</text:p>
          </table:table-cell>
          <table:table-cell table:formula="of:=255-[.F32]" office:value-type="float" office:value="81.5362255531615" calcext:value-type="float">
            <text:p>81,5362255531615</text:p>
          </table:table-cell>
          <table:table-cell office:value-type="string" calcext:value-type="string">
            <text:p>Чугуев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Шкотовский район </text:p>
          </table:table-cell>
          <table:table-cell office:value-type="float" office:value="24297" calcext:value-type="float">
            <text:p>24297</text:p>
          </table:table-cell>
          <table:table-cell office:value-type="float" office:value="688" calcext:value-type="float">
            <text:p>688</text:p>
          </table:table-cell>
          <table:table-cell table:formula="of:=[.C33]/[.B33]*100" office:value-type="float" office:value="2.83162530353542" calcext:value-type="float">
            <text:p>2,83162530353542</text:p>
          </table:table-cell>
          <table:table-cell table:formula="of:=([.D33]-[.D$37])/[.D$38]" office:value-type="float" office:value="0.32753792684758" calcext:value-type="float">
            <text:p>0,32753792684758</text:p>
          </table:table-cell>
          <table:table-cell table:formula="of:=[.E33]*255" office:value-type="float" office:value="83.5221713461329" calcext:value-type="float">
            <text:p>83,5221713461329</text:p>
          </table:table-cell>
          <table:table-cell table:formula="of:=255-[.F33]" office:value-type="float" office:value="171.477828653867" calcext:value-type="float">
            <text:p>171,477828653867</text:p>
          </table:table-cell>
          <table:table-cell office:value-type="string" calcext:value-type="string">
            <text:p>Шкотов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ковлевский район </text:p>
          </table:table-cell>
          <table:table-cell office:value-type="float" office:value="14227" calcext:value-type="float">
            <text:p>14227</text:p>
          </table:table-cell>
          <table:table-cell office:value-type="float" office:value="407" calcext:value-type="float">
            <text:p>407</text:p>
          </table:table-cell>
          <table:table-cell table:formula="of:=[.C34]/[.B34]*100" office:value-type="float" office:value="2.86075771420538" calcext:value-type="float">
            <text:p>2,86075771420538</text:p>
          </table:table-cell>
          <table:table-cell table:formula="of:=([.D34]-[.D$37])/[.D$38]" office:value-type="float" office:value="0.33479461295515" calcext:value-type="float">
            <text:p>0,33479461295515</text:p>
          </table:table-cell>
          <table:table-cell table:formula="of:=[.E34]*255" office:value-type="float" office:value="85.3726263035633" calcext:value-type="float">
            <text:p>85,3726263035633</text:p>
          </table:table-cell>
          <table:table-cell table:formula="of:=255-[.F34]" office:value-type="float" office:value="169.627373696437" calcext:value-type="float">
            <text:p>169,627373696437</text:p>
          </table:table-cell>
          <table:table-cell table:style-name="Default" office:value-type="string" calcext:value-type="string">
            <text:p>Яковлевский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макс</text:p>
          </table:table-cell>
          <table:table-cell table:formula="of:=MAX([.D1:.D34])" office:value-type="float" office:value="5.5312654677446" calcext:value-type="float">
            <text:p>5,53126546774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мин</text:p>
          </table:table-cell>
          <table:table-cell table:formula="of:=MIN([.D1:.D34])" office:value-type="float" office:value="1.51670424267268" calcext:value-type="float">
            <text:p>1,5167042426726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див</text:p>
          </table:table-cell>
          <table:table-cell table:formula="of:=[.D36]-[.D37]" office:value-type="float" office:value="4.01456122507192" calcext:value-type="float">
            <text:p>4,01456122507192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H1:Лист1.H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1:57:56.530549988</meta:creation-date>
    <dc:date>2018-11-03T18:00:04.768812276</dc:date>
    <meta:editing-duration>PT27M21S</meta:editing-duration>
    <meta:editing-cycles>1</meta:editing-cycles>
    <meta:document-statistic meta:table-count="1" meta:cell-count="299" meta:object-count="0"/>
    <meta:generator>LibreOffice/6.0.6.2$Linux_X86_64 LibreOffice_project/00$Build-2</meta:generator>
  </office:meta>
</office:document-meta>
</file>